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4E000003385195465A.png" manifest:media-type="image/png"/>
  <manifest:file-entry manifest:full-path="Pictures/100000010000044C00000340CE9F3CB4.png" manifest:media-type="image/png"/>
  <manifest:file-entry manifest:full-path="Pictures/100000010000045E0000035C0CAE184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2f0" officeooo:paragraph-rsid="0009d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EDBACK CLINTE – LANDING PAGE MACHADO PLATAFORMAS</text:p>
      <text:p text:style-name="P1"/>
      <text:p text:style-name="P1">1- Eu não gosto disso aqui, tá muita informação mta escrita mta letra não dá de entender nada. Parece um monte de frase perdida junto aos olhos. Tem que ser limpo e visual, claro, direto. Simples mas simples sem ser um peso visual</text:p>
      <text:p text:style-name="P1"><draw:frame draw:style-name="fr1" draw:name="Figura1" text:anchor-type="char" svg:x="-0.337cm" svg:y="1.693cm" svg:width="17cm" svg:height="12.859cm" draw:z-index="0"><draw:image xlink:href="Pictures/100000010000044C00000340CE9F3CB4.png" xlink:type="simple" xlink:show="embed" xlink:actuate="onLoad" draw:mime-type="image/png"/></draw:frame></text:p>
      <text:p text:style-name="P1">Aqui a mesma coisa, parece que as frases estão perdidas ali junto de um 22 do Bozo junto</text:p>
      <text:p text:style-name="P1"/>
      <text:p text:style-name="P1">Aqui a mesma coisa, parece que as frases estão perdidas ali junto de um 22 do Bozo junto</text:p>
      <text:p text:style-name="P1"><draw:frame draw:style-name="fr2" draw:name="Figura2" text:anchor-type="as-char" svg:width="10.918cm" svg:height="6.392cm" draw:z-index="1"><draw:image xlink:href="Pictures/100000010000044E000003385195465A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Figura3" text:anchor-type="char" svg:x="0cm" svg:y="0.623cm" svg:width="17cm" svg:height="13.077cm" draw:z-index="2"><draw:image xlink:href="Pictures/100000010000045E0000035C0CAE1842.png" xlink:type="simple" xlink:show="embed" xlink:actuate="onLoad" draw:mime-type="image/png"/></draw:frame><text:soft-page-break/>E aqui tá só esses números sozinhos sem nada ( estudar remover essa seçao)</text:p>
      <text:p text:style-name="P1"/>
      <text:p text:style-name="P1"/>
      <text:p text:style-name="P1">Prever pagina do produtro para ter mesma apresentaçao parecida com a hom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13:39:48.979281700</meta:creation-date>
    <dc:date>2026-05-12T13:46:26.308819600</dc:date>
    <meta:editing-duration>PT6M37S</meta:editing-duration>
    <meta:editing-cycles>1</meta:editing-cycles>
    <meta:document-statistic meta:table-count="0" meta:image-count="3" meta:object-count="0" meta:page-count="2" meta:paragraph-count="7" meta:word-count="111" meta:character-count="603" meta:non-whitespace-character-count="497"/>
    <meta:generator>LibreOffice/26.2.3.2$Windows_X86_64 LibreOffice_project/70e089b17412e4cb7773e41413306b17a2328c34</meta:generator>
  </office:meta>
</office:document-meta>
</file>